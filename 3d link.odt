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s2 fat - <text:a xlink:type="simple" xlink:href="https://sketchfab.com/3d-models/classic-ps2-b2110ad2d21d451197590849da379b6e" text:style-name="Internet_20_link" text:visited-style-name="Visited_20_Internet_20_Link">https://sketchfab.com/3d-models/classic-ps2-b2110ad2d21d451197590849da379b6e</text:a></text:p>
      <text:p text:style-name="Standard"/>
      <text:p text:style-name="Standard">ps2 game model - <text:a xlink:type="simple" xlink:href="https://sketchfab.com/3d-models/dvdps2wii-case-60c2e703f9764cd6885811452802b3aa" text:style-name="Internet_20_link" text:visited-style-name="Visited_20_Internet_20_Link">https://sketchfab.com/3d-models/dvdps2wii-case-60c2e703f9764cd6885811452802b3aa</text:a></text:p>
      <text:p text:style-name="Standard"/>
      <text:p text:style-name="Standard">ps2 joypad - <text:a xlink:type="simple" xlink:href="https://sketchfab.com/3d-models/ps2-controller-9b0db71448a14907a6235c79bdce786a" text:style-name="Internet_20_link" text:visited-style-name="Visited_20_Internet_20_Link">https://sketchfab.com/3d-models/ps2-controller-9b0db71448a14907a6235c79bdce786a</text:a></text:p>
      <text:p text:style-name="Standard"/>
      <text:p text:style-name="Standard">xbox e joypad - <text:a xlink:type="simple" xlink:href="https://sketchfab.com/3d-models/psx-xbox-console-controller-611c5e5e30664b0bade4d583b21905da" text:style-name="Internet_20_link" text:visited-style-name="Visited_20_Internet_20_Link">https://sketchfab.com/3d-models/psx-xbox-console-controller-611c5e5e30664b0bade4d583b21905da</text:a></text:p>
      <text:p text:style-name="Standard"/>
      <text:p text:style-name="Standard">ps1 - <text:a xlink:type="simple" xlink:href="https://sketchfab.com/3d-models/playstation-1-96bed8283f2940d7bb4b1866ab0637a2" text:style-name="Internet_20_link" text:visited-style-name="Visited_20_Internet_20_Link">https://sketchfab.com/3d-models/playstation-1-96bed8283f2940d7bb4b1866ab0637a2</text:a></text:p>
      <text:p text:style-name="Standard"/>
      <text:p text:style-name="Standard">psone - <text:a xlink:type="simple" xlink:href="https://sketchfab.com/3d-models/ps-one-low-poly-model-pixel-art-texture-dc3f896c82534426a23e72dc6837abe1" text:style-name="Internet_20_link" text:visited-style-name="Visited_20_Internet_20_Link">https://sketchfab.com/3d-models/ps-one-low-poly-model-pixel-art-texture-dc3f896c82534426a23e72dc6837abe1</text:a></text:p>
      <text:p text:style-name="Standard"/>
      <text:p text:style-name="Standard">cd music case - <text:a xlink:type="simple" xlink:href="https://sketchfab.com/3d-models/album-case-3d-model-ca4a9638c62b4c5197eef5253e436e6b" text:style-name="Internet_20_link" text:visited-style-name="Visited_20_Internet_20_Link">https://sketchfab.com/3d-models/album-case-3d-model-ca4a9638c62b4c5197eef5253e436e6b</text:a></text:p>
      <text:p text:style-name="Standard"/>
      <text:p text:style-name="Standard">vinile - <text:a xlink:type="simple" xlink:href="https://sketchfab.com/3d-models/vinyl-record-b9e96ded235d4188ac966fc63a2ea1ce" text:style-name="Internet_20_link" text:visited-style-name="Visited_20_Internet_20_Link">https://sketchfab.com/3d-models/vinyl-record-b9e96ded235d4188ac966fc63a2ea1ce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44S</meta:editing-duration>
    <meta:editing-cycles>3</meta:editing-cycles>
    <meta:generator>OpenOffice/4.1.16$Win32 OpenOffice.org_project/4116m3$Build-9816</meta:generator>
    <dc:date>2026-06-02T16:08:08.59</dc:date>
    <meta:document-statistic meta:table-count="0" meta:image-count="0" meta:object-count="0" meta:page-count="1" meta:paragraph-count="8" meta:word-count="32" meta:character-count="764"/>
    <meta:user-defined meta:name="Info 1"/>
    <meta:user-defined meta:name="Info 2"/>
    <meta:user-defined meta:name="Info 3"/>
    <meta:user-defined meta:name="Info 4"/>
  </office:meta>
</office:document-meta>
</file>