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s1 logo - <text:a xlink:type="simple" xlink:href="https://sketchfab.com/3d-models/psplaystation-logo-700464e8aa974559ac0959f848fd8129" text:style-name="Internet_20_link" text:visited-style-name="Visited_20_Internet_20_Link">https://sketchfab.com/3d-models/psplaystation-logo-700464e8aa974559ac0959f848fd8129</text:a></text:p>
      <text:p text:style-name="Standard"/>
      <text:p text:style-name="Standard">boombox - <text:a xlink:type="simple" xlink:href="https://sketchfab.com/3d-models/boombox-3885440909b9465f96d10f2551dc20bf" text:style-name="Internet_20_link" text:visited-style-name="Visited_20_Internet_20_Link">https://sketchfab.com/3d-models/boombox-3885440909b9465f96d10f2551dc20bf</text:a></text:p>
      <text:p text:style-name="Standard"/>
      <text:p text:style-name="Standard">vinili - <text:a xlink:type="simple" xlink:href="https://sketchfab.com/3d-models/vinyls-3-4b9e9358335e4e0aa3aab21d989960af" text:style-name="Internet_20_link" text:visited-style-name="Visited_20_Internet_20_Link">https://sketchfab.com/3d-models/vinyls-3-4b9e9358335e4e0aa3aab21d989960af</text:a></text:p>
      <text:p text:style-name="Standard"/>
      <text:p text:style-name="Standard">libri - <text:a xlink:type="simple" xlink:href="https://sketchfab.com/3d-models/book-stack-198d3bdc5384426b9695394a82bc3825" text:style-name="Internet_20_link" text:visited-style-name="Visited_20_Internet_20_Link">https://sketchfab.com/3d-models/book-stack-198d3bdc5384426b9695394a82bc3825</text:a></text:p>
      <text:p text:style-name="Standard"/>
      <text:p text:style-name="Standard">lampada - <text:a xlink:type="simple" xlink:href="https://sketchfab.com/3d-models/blue-desk-lamp-vintage-90s-6d658aa682554f0e9a481e11e3260169" text:style-name="Internet_20_link" text:visited-style-name="Visited_20_Internet_20_Link">https://sketchfab.com/3d-models/blue-desk-lamp-vintage-90s-6d658aa682554f0e9a481e11e3260169</text:a></text:p>
      <text:p text:style-name="Standard"/>
      <text:p text:style-name="Standard">Trading cards - <text:a xlink:type="simple" xlink:href="https://sketchfab.com/3d-models/trading-card-pack-26d1a87e47814d0ea3a710d169e3a671" text:style-name="Internet_20_link" text:visited-style-name="Visited_20_Internet_20_Link">https://sketchfab.com/3d-models/trading-card-pack-26d1a87e47814d0ea3a710d169e3a671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M15S</meta:editing-duration>
    <meta:editing-cycles>3</meta:editing-cycles>
    <meta:generator>OpenOffice/4.1.16$Win32 OpenOffice.org_project/4116m3$Build-9816</meta:generator>
    <dc:date>2026-06-03T11:51:38.64</dc:date>
    <meta:document-statistic meta:table-count="0" meta:image-count="0" meta:object-count="0" meta:page-count="1" meta:paragraph-count="6" meta:word-count="20" meta:character-count="540"/>
    <meta:user-defined meta:name="Info 1"/>
    <meta:user-defined meta:name="Info 2"/>
    <meta:user-defined meta:name="Info 3"/>
    <meta:user-defined meta:name="Info 4"/>
  </office:meta>
</office:document-meta>
</file>